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610000036BE64346F3.png" manifest:media-type="image/png"/>
  <manifest:file-entry manifest:full-path="Pictures/100000010000063B0000023092982E16.png" manifest:media-type="image/png"/>
  <manifest:file-entry manifest:full-path="Pictures/100000010000063B0000017B488B42D6.png" manifest:media-type="image/png"/>
  <manifest:file-entry manifest:full-path="Pictures/100000010000062A0000023BCE841477.png" manifest:media-type="image/png"/>
  <manifest:file-entry manifest:full-path="Pictures/100000010000077B0000025813DA683E.png" manifest:media-type="image/png"/>
  <manifest:file-entry manifest:full-path="Pictures/10000001000005B30000023B7C46CD1E.png" manifest:media-type="image/png"/>
  <manifest:file-entry manifest:full-path="Pictures/1000000100000765000003977C63A22A.png" manifest:media-type="image/png"/>
  <manifest:file-entry manifest:full-path="Pictures/100000010000076A0000037B58D56D52.png" manifest:media-type="image/png"/>
  <manifest:file-entry manifest:full-path="Pictures/100000010000076900000392E8D21070.png" manifest:media-type="image/png"/>
  <manifest:file-entry manifest:full-path="Pictures/100000010000076400000396DB291504.png" manifest:media-type="image/png"/>
  <manifest:file-entry manifest:full-path="Pictures/10000001000005DA00000272638C4A59.png" manifest:media-type="image/png"/>
  <manifest:file-entry manifest:full-path="Pictures/10000001000005C60000038CF6A84EB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803cm" fo:margin-left="-1.217cm" table:align="left"/>
    </style:style>
    <style:style style:name="Table1.A" style:family="table-column">
      <style:table-column-properties style:column-width="2.799cm"/>
    </style:style>
    <style:style style:name="Table1.B" style:family="table-column">
      <style:table-column-properties style:column-width="5.997cm"/>
    </style:style>
    <style:style style:name="Table1.C" style:family="table-column">
      <style:table-column-properties style:column-width="6.608cm"/>
    </style:style>
    <style:style style:name="Table1.D" style:family="table-column">
      <style:table-column-properties style:column-width="4.3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7.811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6c037" officeooo:paragraph-rsid="0006c037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47781" officeooo:paragraph-rsid="0014778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6c037" officeooo:paragraph-rsid="0012b560"/>
    </style:style>
    <style:style style:name="P4" style:family="paragraph" style:parent-style-name="Table_20_Contents">
      <style:paragraph-properties fo:line-height="115%" fo:text-align="center" style:justify-single-word="false"/>
      <style:text-properties officeooo:rsid="0006c037" officeooo:paragraph-rsid="0006c037"/>
    </style:style>
    <style:style style:name="P5" style:family="paragraph" style:parent-style-name="Table_20_Contents">
      <style:paragraph-properties fo:line-height="115%" fo:text-align="start" style:justify-single-word="false"/>
      <style:text-properties fo:font-size="10pt" officeooo:paragraph-rsid="0006c037" style:font-size-asian="10pt" style:font-size-complex="10pt"/>
    </style:style>
    <style:style style:name="P6" style:family="paragraph" style:parent-style-name="Table_20_Contents">
      <style:paragraph-properties fo:line-height="115%" fo:text-align="start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line-height="115%" fo:text-align="start" style:justify-single-word="false"/>
      <style:text-properties fo:font-size="10pt" officeooo:rsid="00090285" officeooo:paragraph-rsid="00090285" style:font-size-asian="10pt" style:font-size-complex="10pt"/>
    </style:style>
    <style:style style:name="P8" style:family="paragraph" style:parent-style-name="Table_20_Contents">
      <style:paragraph-properties fo:line-height="115%" fo:text-align="start" style:justify-single-word="false"/>
      <style:text-properties fo:font-size="10pt" fo:font-weight="bold" officeooo:rsid="000e9508" officeooo:paragraph-rsid="000e9508" style:font-size-asian="10pt" style:font-weight-asian="bold" style:font-size-complex="10pt" style:font-weight-complex="bold"/>
    </style:style>
    <style:style style:name="P9" style:family="paragraph" style:parent-style-name="Table_20_Contents" style:list-style-name="L1">
      <style:paragraph-properties fo:line-height="115%" fo:text-align="start" style:justify-single-word="false"/>
      <style:text-properties officeooo:paragraph-rsid="0009f058"/>
    </style:style>
    <style:style style:name="P10" style:family="paragraph" style:parent-style-name="Table_20_Contents" style:list-style-name="L1">
      <style:paragraph-properties fo:line-height="115%" fo:text-align="start" style:justify-single-word="false"/>
      <style:text-properties fo:font-size="10pt" officeooo:rsid="000c2663" officeooo:paragraph-rsid="0010b70d" style:font-size-asian="10pt" style:font-size-complex="10pt"/>
    </style:style>
    <style:style style:name="P11" style:family="paragraph" style:parent-style-name="Table_20_Contents" style:list-style-name="L1">
      <style:paragraph-properties fo:line-height="115%" fo:text-align="start" style:justify-single-word="false"/>
      <style:text-properties fo:font-size="10pt" officeooo:rsid="000c2af4" officeooo:paragraph-rsid="0010b70d" style:font-size-asian="10pt" style:font-size-complex="10pt"/>
    </style:style>
    <style:style style:name="P12" style:family="paragraph" style:parent-style-name="Table_20_Contents" style:list-style-name="L1">
      <style:paragraph-properties fo:line-height="115%" fo:text-align="start" style:justify-single-word="false"/>
      <style:text-properties fo:font-size="10pt" officeooo:rsid="0009f058" officeooo:paragraph-rsid="0009f058" style:font-size-asian="10pt" style:font-size-complex="10pt"/>
    </style:style>
    <style:style style:name="P13" style:family="paragraph" style:parent-style-name="Table_20_Contents">
      <style:paragraph-properties fo:line-height="115%" fo:text-align="start" style:justify-single-word="false"/>
      <style:text-properties fo:font-size="10pt" officeooo:rsid="0009f058" officeooo:paragraph-rsid="0009f058" style:font-size-asian="10pt" style:font-size-complex="10pt"/>
    </style:style>
    <style:style style:name="P14" style:family="paragraph" style:parent-style-name="Table_20_Contents" style:list-style-name="L1">
      <style:paragraph-properties fo:line-height="115%" fo:text-align="start" style:justify-single-word="false"/>
      <style:text-properties fo:font-size="10pt" officeooo:rsid="000e9508" officeooo:paragraph-rsid="000e9508" style:font-size-asian="10pt" style:font-size-complex="10pt"/>
    </style:style>
    <style:style style:name="P15" style:family="paragraph" style:parent-style-name="Table_20_Contents">
      <style:paragraph-properties fo:line-height="115%" fo:text-align="start" style:justify-single-word="false"/>
      <style:text-properties fo:font-size="10pt" fo:font-weight="bold" officeooo:rsid="000f2f5f" officeooo:paragraph-rsid="000f2f5f" style:font-size-asian="10pt" style:font-weight-asian="bold" style:font-size-complex="10pt" style:font-weight-complex="bold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fo:font-size="10pt" officeooo:rsid="0010b70d" officeooo:paragraph-rsid="0010b70d" style:font-size-asian="10pt" style:font-size-complex="10pt"/>
    </style:style>
    <style:style style:name="P17" style:family="paragraph" style:parent-style-name="Table_20_Contents">
      <style:paragraph-properties fo:line-height="115%" fo:text-align="start" style:justify-single-word="false"/>
      <style:text-properties fo:font-size="10pt" officeooo:rsid="00084944" officeooo:paragraph-rsid="000bd485" style:font-size-asian="10pt" style:font-size-complex="10pt"/>
    </style:style>
    <style:style style:name="P18" style:family="paragraph" style:parent-style-name="Table_20_Contents">
      <style:paragraph-properties fo:line-height="115%" fo:text-align="start" style:justify-single-word="false"/>
      <style:text-properties fo:font-size="10pt" officeooo:rsid="000c2663" officeooo:paragraph-rsid="000c2663" style:font-size-asian="10pt" style:font-size-complex="10pt"/>
    </style:style>
    <style:style style:name="P19" style:family="paragraph" style:parent-style-name="Table_20_Contents">
      <style:paragraph-properties fo:line-height="115%" fo:text-align="start" style:justify-single-word="false"/>
      <style:text-properties fo:font-size="10pt" fo:font-weight="bold" officeooo:rsid="000e9508" officeooo:paragraph-rsid="0010b70d" style:font-size-asian="10pt" style:font-weight-asian="bold" style:font-size-complex="10pt" style:font-weight-complex="bold"/>
    </style:style>
    <style:style style:name="P20" style:family="paragraph" style:parent-style-name="Table_20_Contents" style:list-style-name="L2">
      <style:paragraph-properties fo:line-height="115%" fo:text-align="start" style:justify-single-word="false"/>
      <style:text-properties fo:font-size="10pt" officeooo:rsid="000c2663" officeooo:paragraph-rsid="000c2663" style:font-size-asian="10pt" style:font-size-complex="10pt"/>
    </style:style>
    <style:style style:name="P21" style:family="paragraph" style:parent-style-name="Table_20_Contents" style:list-style-name="L2">
      <style:paragraph-properties fo:line-height="115%" fo:text-align="start" style:justify-single-word="false"/>
      <style:text-properties fo:font-size="10pt" officeooo:rsid="000c2af4" officeooo:paragraph-rsid="000c2af4" style:font-size-asian="10pt" style:font-size-complex="10pt"/>
    </style:style>
    <style:style style:name="P22" style:family="paragraph" style:parent-style-name="Table_20_Contents" style:list-style-name="L2">
      <style:paragraph-properties fo:line-height="115%" fo:text-align="start" style:justify-single-word="false"/>
      <style:text-properties fo:font-size="10pt" officeooo:rsid="001184de" officeooo:paragraph-rsid="001184de" style:font-size-asian="10pt" style:font-size-complex="10pt"/>
    </style:style>
    <style:style style:name="P23" style:family="paragraph" style:parent-style-name="Table_20_Contents">
      <style:paragraph-properties fo:line-height="115%" fo:text-align="start" style:justify-single-word="false"/>
      <style:text-properties fo:font-size="10pt" fo:font-weight="bold" officeooo:rsid="0010b70d" officeooo:paragraph-rsid="0010b70d" style:font-size-asian="10pt" style:font-weight-asian="bold" style:font-size-complex="10pt" style:font-weight-complex="bold"/>
    </style:style>
    <style:style style:name="P24" style:family="paragraph" style:parent-style-name="Table_20_Contents" style:list-style-name="L2">
      <style:paragraph-properties fo:line-height="115%" fo:text-align="start" style:justify-single-word="false"/>
      <style:text-properties fo:font-size="10pt" officeooo:rsid="0009f058" officeooo:paragraph-rsid="0010b70d" style:font-size-asian="10pt" style:font-size-complex="10pt"/>
    </style:style>
    <style:style style:name="P25" style:family="paragraph" style:parent-style-name="Table_20_Contents" style:list-style-name="L2">
      <style:paragraph-properties fo:line-height="115%" fo:text-align="start" style:justify-single-word="false"/>
      <style:text-properties fo:font-size="10pt" officeooo:rsid="000e9508" officeooo:paragraph-rsid="0010b70d" style:font-size-asian="10pt" style:font-size-complex="10pt"/>
    </style:style>
    <style:style style:name="P26" style:family="paragraph" style:parent-style-name="Table_20_Contents" style:list-style-name="L2">
      <style:paragraph-properties fo:line-height="115%" fo:text-align="start" style:justify-single-word="false"/>
      <style:text-properties fo:font-size="10pt" officeooo:rsid="000c4fab" officeooo:paragraph-rsid="0010b70d" style:font-size-asian="10pt" style:font-size-complex="10pt"/>
    </style:style>
    <style:style style:name="P27" style:family="paragraph" style:parent-style-name="Table_20_Contents" style:list-style-name="L2">
      <style:paragraph-properties fo:line-height="115%" fo:text-align="start" style:justify-single-word="false"/>
      <style:text-properties fo:font-size="10pt" officeooo:rsid="0010b70d" officeooo:paragraph-rsid="0010b70d" style:font-size-asian="10pt" style:font-size-complex="10pt"/>
    </style:style>
    <style:style style:name="P28" style:family="paragraph" style:parent-style-name="Table_20_Contents">
      <style:paragraph-properties fo:line-height="115%" fo:text-align="start" style:justify-single-word="false"/>
      <style:text-properties fo:font-size="10pt" officeooo:rsid="000ce603" officeooo:paragraph-rsid="000ce603" style:font-size-asian="10pt" style:font-size-complex="10pt"/>
    </style:style>
    <style:style style:name="P29" style:family="paragraph" style:parent-style-name="Table_20_Contents">
      <style:paragraph-properties fo:line-height="115%" fo:text-align="start" style:justify-single-word="false"/>
      <style:text-properties fo:font-size="10pt" fo:font-weight="bold" officeooo:rsid="0010b70d" officeooo:paragraph-rsid="0012b560" style:font-size-asian="10pt" style:font-weight-asian="bold" style:font-size-complex="10pt" style:font-weight-complex="bold"/>
    </style:style>
    <style:style style:name="P30" style:family="paragraph" style:parent-style-name="Table_20_Contents" style:list-style-name="L3">
      <style:paragraph-properties fo:line-height="115%" fo:text-align="start" style:justify-single-word="false"/>
      <style:text-properties fo:font-size="10pt" officeooo:rsid="000ce603" officeooo:paragraph-rsid="000ce603" style:font-size-asian="10pt" style:font-size-complex="10pt"/>
    </style:style>
    <style:style style:name="P31" style:family="paragraph" style:parent-style-name="Table_20_Contents" style:list-style-name="L3">
      <style:paragraph-properties fo:line-height="115%" fo:text-align="start" style:justify-single-word="false"/>
      <style:text-properties fo:font-size="10pt" officeooo:rsid="0009f058" officeooo:paragraph-rsid="0012b560" style:font-size-asian="10pt" style:font-size-complex="10pt"/>
    </style:style>
    <style:style style:name="P32" style:family="paragraph" style:parent-style-name="Table_20_Contents" style:list-style-name="L3">
      <style:paragraph-properties fo:line-height="115%" fo:text-align="start" style:justify-single-word="false"/>
      <style:text-properties fo:font-size="10pt" officeooo:rsid="0010b70d" officeooo:paragraph-rsid="0012b560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officeooo:rsid="0012b560" officeooo:paragraph-rsid="0006c037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2b560" officeooo:paragraph-rsid="0012b560" style:font-weight-asian="bold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12b560" officeooo:paragraph-rsid="0012b560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17be14" officeooo:paragraph-rsid="0017be14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1acc4c" officeooo:paragraph-rsid="001acc4c"/>
    </style:style>
    <style:style style:name="P38" style:family="paragraph" style:parent-style-name="Standard" style:list-style-name="L4">
      <style:paragraph-properties fo:text-align="start" style:justify-single-word="false"/>
      <style:text-properties officeooo:rsid="00175cef" officeooo:paragraph-rsid="00175cef"/>
    </style:style>
    <style:style style:name="P39" style:family="paragraph" style:parent-style-name="Standard">
      <style:paragraph-properties fo:text-align="start" style:justify-single-word="false"/>
      <style:text-properties officeooo:paragraph-rsid="0012b560"/>
    </style:style>
    <style:style style:name="P40" style:family="paragraph" style:parent-style-name="Standard">
      <style:paragraph-properties fo:text-align="start" style:justify-single-word="false"/>
      <style:text-properties officeooo:paragraph-rsid="00147781"/>
    </style:style>
    <style:style style:name="P41" style:family="paragraph" style:parent-style-name="Standard">
      <style:paragraph-properties fo:text-align="start" style:justify-single-word="false"/>
      <style:text-properties fo:font-size="15pt" fo:font-weight="bold" officeooo:rsid="00147781" officeooo:paragraph-rsid="00147781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15c09a" officeooo:paragraph-rsid="0015c09a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5c09a" officeooo:paragraph-rsid="0015c09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1c1ebe" officeooo:paragraph-rsid="001c1eb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5c09a" officeooo:paragraph-rsid="00173b5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73b53" officeooo:paragraph-rsid="00173b5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8cd0c" officeooo:paragraph-rsid="0018cd0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rsid="0017be14" officeooo:paragraph-rsid="0017be14"/>
    </style:style>
    <style:style style:name="P49" style:family="paragraph" style:parent-style-name="Standard">
      <style:paragraph-properties fo:text-align="start" style:justify-single-word="false"/>
      <style:text-properties officeooo:rsid="00194c51" officeooo:paragraph-rsid="00194c51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94c51" officeooo:paragraph-rsid="00194c51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94c51" officeooo:paragraph-rsid="00194c51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1acc4c" officeooo:paragraph-rsid="001acc4c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bold" officeooo:rsid="001c157e" officeooo:paragraph-rsid="001c157e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1c157e" officeooo:paragraph-rsid="001c157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bold" officeooo:rsid="001c1ebe" officeooo:paragraph-rsid="001c1ebe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1c1ebe" officeooo:paragraph-rsid="001c1ebe" style:font-weight-asian="normal" style:font-weight-complex="normal"/>
    </style:style>
    <style:style style:name="T1" style:family="text">
      <style:text-properties officeooo:rsid="0006c037"/>
    </style:style>
    <style:style style:name="T2" style:family="text">
      <style:text-properties officeooo:rsid="00090285"/>
    </style:style>
    <style:style style:name="T3" style:family="text">
      <style:text-properties officeooo:rsid="00084944"/>
    </style:style>
    <style:style style:name="T4" style:family="text">
      <style:text-properties officeooo:rsid="0010b70d"/>
    </style:style>
    <style:style style:name="T5" style:family="text">
      <style:text-properties fo:font-size="10pt" officeooo:rsid="0010b70d" style:font-size-asian="10pt" style:font-size-complex="10pt"/>
    </style:style>
    <style:style style:name="T6" style:family="text">
      <style:text-properties fo:font-size="10pt" officeooo:rsid="0009f058" style:font-size-asian="10pt" style:font-size-complex="10pt"/>
    </style:style>
    <style:style style:name="T7" style:family="text">
      <style:text-properties fo:font-size="10pt" officeooo:rsid="000e9508" style:font-size-asian="10pt" style:font-size-complex="10pt"/>
    </style:style>
    <style:style style:name="T8" style:family="text">
      <style:text-properties officeooo:rsid="000c2af4"/>
    </style:style>
    <style:style style:name="T9" style:family="text">
      <style:text-properties officeooo:rsid="000e9508"/>
    </style:style>
    <style:style style:name="T10" style:family="text">
      <style:text-properties officeooo:rsid="000f2f5f"/>
    </style:style>
    <style:style style:name="T11" style:family="text">
      <style:text-properties officeooo:rsid="000c4fab"/>
    </style:style>
    <style:style style:name="T12" style:family="text">
      <style:text-properties officeooo:rsid="000bd485"/>
    </style:style>
    <style:style style:name="T13" style:family="text">
      <style:text-properties officeooo:rsid="0012b560"/>
    </style:style>
    <style:style style:name="T14" style:family="text">
      <style:text-properties officeooo:rsid="000c2663"/>
    </style:style>
    <style:style style:name="T15" style:family="text">
      <style:text-properties officeooo:rsid="001184de"/>
    </style:style>
    <style:style style:name="T16" style:family="text">
      <style:text-properties officeooo:rsid="000ce603"/>
    </style:style>
    <style:style style:name="T17" style:family="text">
      <style:text-properties officeooo:rsid="001acc4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7be14"/>
    </style:style>
    <style:style style:name="T20" style:family="text">
      <style:text-properties fo:font-weight="bold" officeooo:rsid="001acc4c" style:font-weight-asian="bold" style:font-weight-complex="bold"/>
    </style:style>
    <style:style style:name="T21" style:family="text">
      <style:text-properties fo:font-weight="bold" officeooo:rsid="0017be14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officeooo:rsid="0017be14" fo:background-color="#ffff00" loext:char-shading-value="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73b53"/>
    </style:style>
    <style:style style:name="T26" style:family="text">
      <style:text-properties fo:font-family="'Candara Light'" style:font-family-generic="swiss" style:font-pitch="variable" officeooo:rsid="00173b53"/>
    </style:style>
    <style:style style:name="T27" style:family="text">
      <style:text-properties officeooo:rsid="0018cd0c"/>
    </style:style>
    <style:style style:name="T28" style:family="text">
      <style:text-properties fo:font-size="12pt" officeooo:rsid="0015c09a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1c157e"/>
    </style:style>
    <style:style style:name="T31" style:family="text">
      <style:text-properties officeooo:rsid="001c1ebe"/>
    </style:style>
    <style:style style:name="T32" style:family="text">
      <style:text-properties fo:font-weight="bold" officeooo:rsid="001c1ebe" style:font-weight-asian="bold" style:font-weight-complex="bold"/>
    </style:style>
    <style:style style:name="T33" style:family="text">
      <style:text-properties officeooo:rsid="001d03df"/>
    </style:style>
    <style:style style:name="T34" style:family="text">
      <style:text-properties officeooo:rsid="001e40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urnero Roles y Funcion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SuperAdmin</text:p>
          </table:table-cell>
          <table:table-cell table:style-name="Table1.A1" office:value-type="string">
            <text:p text:style-name="P4">Admin</text:p>
          </table:table-cell>
          <table:table-cell table:style-name="Table1.A1" office:value-type="string">
            <text:p text:style-name="P4">Lider</text:p>
          </table:table-cell>
          <table:table-cell table:style-name="Table1.D1" office:value-type="string">
            <text:p text:style-name="P4">Usuario</text:p>
          </table:table-cell>
        </table:table-row>
        <table:table-row table:style-name="Table1.2">
          <table:table-cell table:style-name="Table1.A2" office:value-type="string">
            <text:p text:style-name="P5">- <text:span text:style-name="T1">Descripción: Rol destinado para inicio del sistema, </text:span><text:span text:style-name="T2">creación de usuarios “Admin” y “SuperAdmin”</text:span></text:p>
          </table:table-cell>
          <table:table-cell table:style-name="Table1.A2" office:value-type="string">
            <text:p text:style-name="P6">- <text:span text:style-name="T1">Descripción: Rol destinado a la persona a cargo de cada departamento/área (Command Center – </text:span><text:span text:style-name="T3">Henry Espin</text:span><text:span text:style-name="T1">).</text:span></text:p>
            <text:p text:style-name="P6"/>
            <text:p text:style-name="P6"/>
            <text:p text:style-name="P7">Todos las funciones</text:p>
            <text:p text:style-name="P7"/>
            <text:p text:style-name="P8">Gesti<text:span text:style-name="T4">ó</text:span>n</text:p>
            <text:list text:style-name="L1">
              <text:list-item>
                <text:p text:style-name="P9"><text:span text:style-name="T5">E</text:span><text:span text:style-name="T6">quipos y grupos </text:span><text:span text:style-name="T7">(CRUD)</text:span></text:p>
                <text:p text:style-name="P10"/>
              </text:list-item>
              <text:list-item>
                <text:p text:style-name="P10"><text:span text:style-name="T4">P</text:span>lanificaci<text:span text:style-name="T4">ones de los equipos para la </text:span><text:span text:style-name="T8">rotación de turnos </text:span><text:span text:style-name="T4">(CRUD)</text:span></text:p>
                <text:p text:style-name="P11"/>
              </text:list-item>
              <text:list-item>
                <text:p text:style-name="P11"><text:span text:style-name="T4">P</text:span>lanificaci<text:span text:style-name="T4">ones de los equipos</text:span> para cobertura de turnos en días feriados</text:p>
                <text:p text:style-name="P10"/>
              </text:list-item>
              <text:list-item>
                <text:p text:style-name="P12"><text:span text:style-name="T9">P</text:span>ersonas <text:span text:style-name="T9">(CRUD) y reinicio de contraseñas.</text:span></text:p>
                <text:p text:style-name="P12"/>
              </text:list-item>
              <text:list-item>
                <text:p text:style-name="P12"><text:span text:style-name="T9">T</text:span>ipos de turno u horarios <text:span text:style-name="T9">(CRUD)</text:span> </text:p>
                <text:p text:style-name="P12"/>
              </text:list-item>
              <text:list-item>
                <text:p text:style-name="P12"><text:span text:style-name="T9">F</text:span>eriados <text:span text:style-name="T9">(CRUD)</text:span> </text:p>
              </text:list-item>
            </text:list>
            <text:p text:style-name="P13"/>
            <text:p text:style-name="P8">Solicitudes</text:p>
            <text:list text:continue-numbering="true" text:style-name="L1">
              <text:list-item>
                <text:p text:style-name="P12"><text:span text:style-name="T9">Revisión</text:span> <text:span text:style-name="T9">solicitudes de </text:span>(vacaciones, permisos y cambios de turno) <text:s/><text:span text:style-name="T9">pendientes e historial</text:span></text:p>
                <text:p text:style-name="P12"/>
              </text:list-item>
              <text:list-item>
                <text:p text:style-name="P14">Aprobación o rechazo de solicitudes pendientes.</text:p>
              </text:list-item>
            </text:list>
            <text:p text:style-name="P8"/>
            <text:p text:style-name="P8">Horas Mensuales</text:p>
            <text:list text:continue-numbering="true" text:style-name="L1">
              <text:list-item>
                <text:p text:style-name="P12">Reporte de horas de trabajo mensual de <text:span text:style-name="T10">todas las</text:span> personas <text:span text:style-name="T10">del área.</text:span></text:p>
              </text:list-item>
            </text:list>
            <text:p text:style-name="P13"/>
            <text:p text:style-name="P15">Calendario</text:p>
            <text:list text:continue-numbering="true" text:style-name="L1">
              <text:list-item>
                <text:p text:style-name="P12"><text:span text:style-name="T10">Distribución semanal de t</text:span><text:span text:style-name="T8">urnos </text:span><text:span text:style-name="T11">de todos los equipos y sus miembros</text:span> (visualización, generación, eliminación y modificación de turnos)</text:p>
                <text:p text:style-name="P12"/>
              </text:list-item>
              <text:list-item>
                <text:p text:style-name="P16">Solicitar y guardar vacaciones <text:soft-page-break/>(No necesita aprobación).</text:p>
                <text:p text:style-name="P16"/>
              </text:list-item>
              <text:list-item>
                <text:p text:style-name="P16">Intercambio de turnos entre miembros (no necesita aprobación)</text:p>
                <text:p text:style-name="P16"/>
              </text:list-item>
              <text:list-item>
                <text:p text:style-name="P16">Solicitar permiso (No aplica)</text:p>
              </text:list-item>
            </text:list>
            <text:p text:style-name="P17"/>
          </table:table-cell>
          <table:table-cell table:style-name="Table1.A2" office:value-type="string">
            <text:p text:style-name="P6">- <text:span text:style-name="T12">Descripción: Rol destinado al líder de equipo </text:span><text:span text:style-name="T10">(SPOC’</text:span><text:span text:style-name="T13">s</text:span><text:span text:style-name="T10">)</text:span><text:span text:style-name="T12">. Manejo de </text:span><text:span text:style-name="T14">usuarios, </text:span><text:span text:style-name="T11">aprobación/rechazo de solicitudes de los miembros y</text:span><text:span text:style-name="T14"> configuraciones de su propio equipo y sus grupos relacionados.</text:span></text:p>
            <text:p text:style-name="P6"/>
            <text:p text:style-name="P18">Funciones habilitadas:</text:p>
            <text:p text:style-name="P18"/>
            <text:p text:style-name="P19">Gesti<text:span text:style-name="T4">ó</text:span>n</text:p>
            <text:list text:style-name="L2">
              <text:list-item>
                <text:p text:style-name="P20">Modificación de las configuraciones del equipo (nombre, método para generación de turnos, elección de tipos de turnos para el equipo)</text:p>
                <text:p text:style-name="P20"/>
              </text:list-item>
              <text:list-item>
                <text:p text:style-name="P20"><text:span text:style-name="T4">P</text:span>lanificación <text:span text:style-name="T8">de rotación de turnos para cada grupo del equipo</text:span></text:p>
                <text:p text:style-name="P20"/>
              </text:list-item>
              <text:list-item>
                <text:p text:style-name="P21"><text:span text:style-name="T4">P</text:span>lanificación para cobertura de turnos en días feriados</text:p>
                <text:p text:style-name="P21"/>
              </text:list-item>
              <text:list-item>
                <text:p text:style-name="P22">Personas (crear nuevo miembro solo para el mismo equipo, editar, eliminar y modificar miembros del equipo)</text:p>
              </text:list-item>
            </text:list>
            <text:p text:style-name="P23"/>
            <text:p text:style-name="P23">Solicitudes</text:p>
            <text:list text:continue-numbering="true" text:style-name="L2">
              <text:list-item>
                <text:p text:style-name="P24"><text:span text:style-name="T9">Revisión</text:span> <text:span text:style-name="T9">solicitudes de </text:span>(vacaciones, <text:s/>permisos y cambios de turno) <text:s/><text:span text:style-name="T9">pendientes e historial </text:span><text:span text:style-name="T4">de los miembros del equipo.</text:span></text:p>
                <text:p text:style-name="P24"/>
              </text:list-item>
              <text:list-item>
                <text:p text:style-name="P25">Aprobación o rechazo de solicitudes pendientes <text:span text:style-name="T4">de los miembros del equipo</text:span>.</text:p>
              </text:list-item>
            </text:list>
            <text:p text:style-name="P23"/>
            <text:p text:style-name="P23">Horas Mensuales</text:p>
            <text:list text:continue-numbering="true" text:style-name="L2">
              <text:list-item>
                <text:p text:style-name="P26">Reporte de horas de trabajo mensual de miembros del equipo.</text:p>
              </text:list-item>
            </text:list>
            <text:p text:style-name="P23"/>
            <text:p text:style-name="P23">Calendario</text:p>
            <text:list text:continue-numbering="true" text:style-name="L2">
              <text:list-item>
                <text:p text:style-name="P24"><text:span text:style-name="T10">Distribución semanal de t</text:span><text:span text:style-name="T8">urnos </text:span><text:span text:style-name="T15">de los miembros del</text:span><text:span text:style-name="T11"> equipos</text:span> (visualización, generación, eliminación y modificación de turnos)</text:p>
                <text:p text:style-name="P24"/>
              </text:list-item>
              <text:list-item>
                <text:p text:style-name="P27"><text:span text:style-name="T15">Crear s</text:span>olicitar vacaciones.</text:p>
                <text:p text:style-name="P27"/>
              </text:list-item>
              <text:list-item>
                <text:p text:style-name="P27"><text:span text:style-name="T15">Crear solicitud de i</text:span>ntercambio de <text:soft-page-break/>turnos entre miembros</text:p>
                <text:p text:style-name="P27"/>
              </text:list-item>
              <text:list-item>
                <text:p text:style-name="P27"><text:span text:style-name="T15">Crear s</text:span>olicit<text:span text:style-name="T15">ud</text:span> permiso</text:p>
              </text:list-item>
            </text:list>
          </table:table-cell>
          <table:table-cell table:style-name="Table1.D2" office:value-type="string">
            <text:p text:style-name="P6">- <text:span text:style-name="T11">Descripción: Rol destinado a los miembros de cada equipo </text:span><text:span text:style-name="T13">(Operarios)</text:span><text:span text:style-name="T11">. Visualización de turnos, generación </text:span><text:span text:style-name="T16">de solicitudes.</text:span></text:p>
            <text:p text:style-name="P6"/>
            <text:p text:style-name="P28">Funciones habilitadas:</text:p>
            <text:p text:style-name="P28"/>
            <text:p text:style-name="P29">Solicitudes</text:p>
            <text:list text:style-name="L3">
              <text:list-item>
                <text:p text:style-name="P30">Visualización del estado de sus solicitudes.</text:p>
              </text:list-item>
            </text:list>
            <text:p text:style-name="P29"/>
            <text:p text:style-name="P29">Horas Mensuales</text:p>
            <text:list text:continue-numbering="true" text:style-name="L3">
              <text:list-item>
                <text:p text:style-name="P30">Visualización de sus horas de trabajo mensual.</text:p>
              </text:list-item>
            </text:list>
            <text:p text:style-name="P29"/>
            <text:p text:style-name="P29">Calendario</text:p>
            <text:list text:continue-numbering="true" text:style-name="L3">
              <text:list-item>
                <text:p text:style-name="P31"><text:span text:style-name="T10">Distribución semanal de t</text:span><text:span text:style-name="T8">urnos </text:span><text:span text:style-name="T15">de los miembros del</text:span><text:span text:style-name="T11"> equipos</text:span> (visualización)</text:p>
                <text:p text:style-name="P31"/>
              </text:list-item>
              <text:list-item>
                <text:p text:style-name="P32"><text:span text:style-name="T15">Crear s</text:span>olicit<text:span text:style-name="T13">ud de</text:span> vacaciones.</text:p>
                <text:p text:style-name="P32"/>
              </text:list-item>
              <text:list-item>
                <text:p text:style-name="P32"><text:span text:style-name="T15">Crear solicitud de i</text:span>ntercambio de turnos entre miembros</text:p>
                <text:p text:style-name="P32"/>
              </text:list-item>
              <text:list-item>
                <text:p text:style-name="P32"><text:span text:style-name="T15">Crear s</text:span>olicit<text:span text:style-name="T15">ud </text:span><text:span text:style-name="T13">de </text:span>permiso</text:p>
              </text:list-item>
            </text:list>
            <text:p text:style-name="P6"/>
          </table:table-cell>
        </table:table-row>
      </table:table>
      <text:p text:style-name="P33"/>
      <text:p text:style-name="P34">Nota:</text:p>
      <text:list text:style-name="L4">
        <text:list-item>
          <text:p text:style-name="P35">Las solicitudes de cualquier tipo (vacaciones, permisos o cambios de turno) son realizadas directamente por el usuario que ha iniciado sesión y siempre se aplican a sí mismo, independientemente del rol que tenga asignado. </text:p>
        </text:list-item>
        <text:list-item>
          <text:p text:style-name="P36">Las planificaciones se deben especificar para cada grupo del equipo, en caso que un equipo no tenga grupo se debe crear un grupo general <text:span text:style-name="T17">abarcar</text:span> a <text:span text:style-name="T17">todos </text:span>los miembros.</text:p>
        </text:list-item>
        <text:list-item>
          <text:p text:style-name="P37">La planificación para feriados se coloca por grupos y los valores guardados simbolizan el número de personas de ese grupo que se desea en ese horario. (no depende del <text:span text:style-name="T18">modo</text:span> de generación de turnos)</text:p>
        </text:list-item>
        <text:list-item>
          <text:p text:style-name="P38">Las planificaciones para los <text:span text:style-name="T19">grupos de cada equipo</text:span> se puede configurar de 2 <text:span text:style-name="T20">modos</text:span>:</text:p>
          <text:list>
            <text:list-item>
              <text:p text:style-name="P38">Generación de turnos <text:span text:style-name="T18">Blueprint/</text:span><text:span text:style-name="T21">plantilla</text:span>: Se basa en colocar un modelo de rotación semanal.</text:p>
              <text:p text:style-name="P38"><draw:frame draw:style-name="fr1" draw:name="Image3" text:anchor-type="char" svg:x="1.861cm" svg:y="0.182cm" svg:width="14.556cm" svg:height="5.11cm" draw:z-index="2"><draw:image xlink:href="Pictures/100000010000063B0000023092982E16.png" xlink:type="simple" xlink:show="embed" xlink:actuate="onLoad" draw:mime-type="image/png"/></draw:frame></text:p>
            </text:list-item>
            <text:list-item>
              <text:p text:style-name="P38">Generación de <text:span text:style-name="T22">rotación/</text:span><text:span text:style-name="T23">generador</text:span><text:span text:style-name="T24">: Se basa en colocar el numero de personas deseadas en cada turno del día.</text:span></text:p>
            </text:list-item>
          </text:list>
        </text:list-item>
      </text:list>
      <text:p text:style-name="P39"><text:tab/><draw:frame draw:style-name="fr1" draw:name="Image4" text:anchor-type="char" svg:x="1.759cm" svg:y="0.395cm" svg:width="14.757cm" svg:height="5.339cm" draw:z-index="1"><draw:image xlink:href="Pictures/100000010000062A0000023BCE841477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40"/>
      <text:p text:style-name="P2">Funciones del Sistema</text:p>
      <text:p text:style-name="P41"/>
      <text:p text:style-name="P42">Gestión – Tipos de turno</text:p>
      <text:p text:style-name="P43"><draw:frame draw:style-name="fr2" draw:name="Image2" text:anchor-type="char" svg:width="17cm" svg:height="6.652cm" draw:z-index="0"><draw:image xlink:href="Pictures/10000001000005B30000023B7C46CD1E.png" xlink:type="simple" xlink:show="embed" xlink:actuate="onLoad" draw:mime-type="image/png"/></draw:frame>En esta pestaña se crean los horarios de jornada en los que los equipos van a trabajar</text:p>
      <text:p text:style-name="P43"/>
      <text:p text:style-name="P44">Gestión – Feriados</text:p>
      <text:p text:style-name="P44"><draw:frame draw:style-name="fr3" draw:name="Image11" text:anchor-type="char" svg:width="17cm" svg:height="5.327cm" draw:z-index="10"><draw:image xlink:href="Pictures/100000010000077B0000025813DA683E.png" xlink:type="simple" xlink:show="embed" xlink:actuate="onLoad" draw:mime-type="image/png"/></draw:frame></text:p>
      <text:p text:style-name="P43"/>
      <text:p text:style-name="P42">Gestión – Equipos y grupos</text:p>
      <text:p text:style-name="P45"><text:span text:style-name="T25">E</text:span>n esta pestaña se listan los equipos a la izquierda y al selecciona<text:span text:style-name="T25">rlo</text:span>, mostrará sus grupos a la derecha, <text:span text:style-name="T25">también se tiene las opciones para crear Equipo y Grupos;</text:span> <text:span text:style-name="T25">cada uno cuenta con acciones de eliminación (basurero), edición/configuración (</text:span><text:span text:style-name="T26">v</text:span><text:span text:style-name="T25">) y planificación para Equipos (engranaje).</text:span></text:p>
      <text:p text:style-name="P46"><draw:frame draw:style-name="fr2" draw:name="Image1" text:anchor-type="char" svg:width="17cm" svg:height="8.248cm" draw:z-index="3"><draw:image xlink:href="Pictures/1000000100000765000003977C63A22A.png" xlink:type="simple" xlink:show="embed" xlink:actuate="onLoad" draw:mime-type="image/png"/></draw:frame><text:soft-page-break/></text:p>
      <text:p text:style-name="P47"><text:span text:style-name="T18">Crear Equipo:</text:span> Al crear el equipo se creará por defecto con el generador de rotación y sin ningún horario seleccionado.</text:p>
      <text:p text:style-name="P46"><text:span text:style-name="T18">Edición/configuración:</text:span> <text:s/><text:span text:style-name="T27">E</text:span>ditar el nombre del equipo, seleccionar el tipo de generación con el que va a generar los turnos <text:span text:style-name="T19">y seleccionar los tipos de turnos jornadas que usa el equipo </text:span><text:span text:style-name="T27">(al finalizar guardar cambios)</text:span><text:span text:style-name="T19">.</text:span></text:p>
      <text:p text:style-name="P48"><text:span text:style-name="T18">Crear grupo:</text:span> <text:span text:style-name="T27">Habiendo seleccionado un equipo, se procede con la creación del grupo (nuevo grupo → crear grupo).</text:span></text:p>
      <text:p text:style-name="P48"/>
      <text:p text:style-name="P48"/>
      <text:p text:style-name="P49"/>
      <text:p text:style-name="P50"><text:span text:style-name="T28">Gestión – Equipos y grupos – </text:span><text:span text:style-name="T29">Acción -</text:span>Planificación </text:p>
      <text:p text:style-name="P51"><draw:frame draw:style-name="fr2" draw:name="Image5" text:anchor-type="char" svg:width="17cm" svg:height="7.874cm" draw:z-index="4"><draw:image xlink:href="Pictures/10000001000007610000036BE64346F3.png" xlink:type="simple" xlink:show="embed" xlink:actuate="onLoad" draw:mime-type="image/png"/></draw:frame>Para <text:span text:style-name="T18">cada grupo</text:span> del equipo se elige un <text:span text:style-name="T18">modo</text:span> de rotación: <text:span text:style-name="T18">rotativo </text:span><text:span text:style-name="T20">ó </text:span><text:span text:style-name="T18">plantilla</text:span></text:p>
      <text:p text:style-name="P50"/>
      <text:p text:style-name="P52"><draw:frame draw:style-name="fr3" draw:name="Image6" text:anchor-type="char" svg:width="17cm" svg:height="4.039cm" draw:z-index="5"><draw:image xlink:href="Pictures/100000010000063B0000017B488B42D6.png" xlink:type="simple" xlink:show="embed" xlink:actuate="onLoad" draw:mime-type="image/png"/></draw:frame><text:soft-page-break/>De igual forma se debe colocar la configuración de Feriados, <text:span text:style-name="T30">que corresponde al número de personas del grupo que se necesita en feriado y en que turno.</text:span></text:p>
      <text:p text:style-name="P52"/>
      <text:p text:style-name="P53">Solicitudes</text:p>
      <text:p text:style-name="P53"><draw:frame draw:style-name="fr1" draw:name="Image7" text:anchor-type="char" svg:x="0.298cm" svg:y="0.212cm" svg:width="15.118cm" svg:height="7.107cm" draw:z-index="6"><draw:image xlink:href="Pictures/100000010000076A0000037B58D56D52.png" xlink:type="simple" xlink:show="embed" xlink:actuate="onLoad" draw:mime-type="image/png"/></draw:frame></text:p>
      <text:p text:style-name="P54">Esta vista muestra las solicitudes de todo tipo <text:span text:style-name="T18">Pendientes</text:span> e <text:span text:style-name="T18">Historial.</text:span></text:p>
      <text:p text:style-name="P54">Las solicitudes siguen una linea de aprobación, <text:span text:style-name="T31">(</text:span><text:span text:style-name="T32">1) </text:span><text:span text:style-name="T18">Lider de equipo → </text:span><text:span text:style-name="T32">(2) </text:span><text:span text:style-name="T18">Admin</text:span></text:p>
      <text:p text:style-name="P53"/>
      <text:p text:style-name="P55">Horas Mensuales</text:p>
      <text:p text:style-name="P56"><draw:frame draw:style-name="fr2" draw:name="Image8" text:anchor-type="char" svg:width="17cm" svg:height="8.195cm" draw:z-index="7"><draw:image xlink:href="Pictures/100000010000076900000392E8D21070.png" xlink:type="simple" xlink:show="embed" xlink:actuate="onLoad" draw:mime-type="image/png"/></draw:frame>En esta ventana se detallan las horas mensuales, extras, sobrecargo nocturno. Pueden ser descargadas</text:p>
      <text:p text:style-name="P56"/>
      <text:p text:style-name="P56"><text:soft-page-break/></text:p>
      <text:p text:style-name="P55">Calendario</text:p>
      <text:p text:style-name="P55"><draw:frame draw:style-name="fr1" draw:name="Image9" text:anchor-type="char" svg:x="0.194cm" svg:y="0.109cm" svg:width="17cm" svg:height="8.253cm" draw:z-index="8"><draw:image xlink:href="Pictures/100000010000076400000396DB291504.png" xlink:type="simple" xlink:show="embed" xlink:actuate="onLoad" draw:mime-type="image/png"/></draw:frame></text:p>
      <text:p text:style-name="P56">Muestra la distribución de los turnos del equipo seleccionado en los filtros de la cabecera.</text:p>
      <text:p text:style-name="P55"/>
      <text:p text:style-name="P55">Calendario – Generar Turno</text:p>
      <text:p text:style-name="P55"/>
      <text:p text:style-name="P56"><draw:frame draw:style-name="fr3" draw:name="Image12" text:anchor-type="char" svg:width="17cm" svg:height="7.103cm" draw:z-index="11"><draw:image xlink:href="Pictures/10000001000005DA00000272638C4A59.png" xlink:type="simple" xlink:show="embed" xlink:actuate="onLoad" draw:mime-type="image/png"/></draw:frame>Se coloca la fecha de inicio y cuantas semanas se desea generar, <text:span text:style-name="T33">se muestran previsualizaciones y una vez de acuerdo se las guarda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5">Calendario - Vacaciones</text:p>
      <text:p text:style-name="P56"><draw:frame draw:style-name="fr2" draw:name="Image10" text:anchor-type="char" svg:width="17cm" svg:height="10.444cm" draw:z-index="9"><draw:image xlink:href="Pictures/10000001000005C60000038CF6A84EBC.png" xlink:type="simple" xlink:show="embed" xlink:actuate="onLoad" draw:mime-type="image/png"/></draw:frame>Colocar el rango de vacaciones y se envian como solicitud para aprobacion (<text:span text:style-name="T33">Excepto para </text:span><text:span text:style-name="T34">Super</text:span><text:span text:style-name="T33">Admin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09:07:37.099043900</meta:creation-date>
    <dc:date>2026-02-23T08:42:03.615101100</dc:date>
    <meta:editing-duration>PT50M53S</meta:editing-duration>
    <meta:editing-cycles>4</meta:editing-cycles>
    <meta:generator>LibreOffice/25.8.4.2$Windows_X86_64 LibreOffice_project/290daaa01b999472f0c7a3890eb6a550fd74c6df</meta:generator>
    <meta:document-statistic meta:table-count="1" meta:image-count="12" meta:object-count="0" meta:page-count="7" meta:paragraph-count="104" meta:word-count="864" meta:character-count="5365" meta:non-whitespace-character-count="4624"/>
  </office:meta>
</office:document-meta>
</file>