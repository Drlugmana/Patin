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560000038504ECFE2F.png"/>
  <manifest:file-entry manifest:media-type="image/png" manifest:full-path="Pictures/10000201000007740000031B27178B6D.png"/>
  <manifest:file-entry manifest:media-type="image/png" manifest:full-path="Pictures/1000020100000612000000A6516F347E.png"/>
  <manifest:file-entry manifest:media-type="image/png" manifest:full-path="Pictures/1000020100000767000003886FC434C1.png"/>
  <manifest:file-entry manifest:media-type="image/png" manifest:full-path="Pictures/100002010000076E0000039419201FA3.png"/>
  <manifest:file-entry manifest:media-type="image/png" manifest:full-path="Pictures/10000201000007660000038882337481.png"/>
  <manifest:file-entry manifest:media-type="image/png" manifest:full-path="Pictures/10000201000007650000036E38B00491.png"/>
  <manifest:file-entry manifest:media-type="image/png" manifest:full-path="Pictures/100002010000076800000334762EA18B.png"/>
  <manifest:file-entry manifest:media-type="image/png" manifest:full-path="Pictures/100002010000063C000001D9CB552229.png"/>
  <manifest:file-entry manifest:media-type="image/png" manifest:full-path="Pictures/1000020100000765000003808DD6195B.png"/>
  <manifest:file-entry manifest:media-type="image/png" manifest:full-path="Pictures/10000201000001FB00000137C8F5CE92.png"/>
  <manifest:file-entry manifest:media-type="image/png" manifest:full-path="Pictures/100002010000076E0000038CE5BF4196.png"/>
  <manifest:file-entry manifest:media-type="image/png" manifest:full-path="Pictures/100002010000076700000376537B57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line-height="100%"/>
    </style:style>
    <style:style style:name="P3" style:family="paragraph" style:parent-style-name="Text_20_body">
      <style:paragraph-properties fo:margin-top="0cm" fo:margin-bottom="0cm"/>
      <style:text-properties fo:font-weight="bold" style:font-weight-asian="bold" style:font-weight-complex="bold"/>
    </style:style>
    <style:style style:name="P4" style:family="paragraph" style:parent-style-name="Text_20_body">
      <style:paragraph-properties fo:margin-top="0cm" fo:margin-bottom="0cm"/>
      <style:text-properties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able_20_Contents">
      <style:paragraph-properties fo:line-height="115%" fo:text-align="start" style:justify-single-word="false"/>
      <style:text-properties fo:font-size="10pt" style:font-size-asian="10pt" style:font-size-complex="10pt"/>
    </style:style>
    <style:style style:name="P7" style:family="paragraph" style:parent-style-name="Table_20_Contents">
      <style:paragraph-properties fo:line-height="115%" fo:text-align="center" style:justify-single-word="false"/>
      <style:text-properties fo:font-size="10pt" style:font-size-asian="10pt" style:font-size-complex="10pt"/>
    </style:style>
    <style:style style:name="P8" style:family="paragraph" style:parent-style-name="Text_20_body" style:list-style-name="L3"/>
    <style:style style:name="P9" style:family="paragraph" style:parent-style-name="Text_20_body" style:list-style-name="L1">
      <style:paragraph-properties fo:margin-top="0cm" fo:margin-bottom="0cm"/>
    </style:style>
    <style:style style:name="P10" style:family="paragraph" style:parent-style-name="Text_20_body" style:list-style-name="L2">
      <style:paragraph-properties fo:margin-top="0cm" fo:margin-bottom="0cm"/>
    </style:style>
    <style:style style:name="P11" style:family="paragraph" style:parent-style-name="Text_20_body" style:list-style-name="L3">
      <style:paragraph-properties fo:margin-top="0cm" fo:margin-bottom="0cm"/>
    </style:style>
    <style:style style:name="P12" style:family="paragraph" style:parent-style-name="Text_20_body" style:list-style-name="L4">
      <style:paragraph-properties fo:margin-top="0cm" fo:margin-bottom="0cm"/>
    </style:style>
    <style:style style:name="P13" style:family="paragraph" style:parent-style-name="Table_20_Contents" style:list-style-name="L5">
      <style:paragraph-properties fo:line-height="115%" fo:text-align="start"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text:span text:style-name="Strong_20_Emphasis">Gestionar empleados</text:span></text:h>
      <text:p text:style-name="P2"><text:span text:style-name="Strong_20_Emphasis">Actor:</text:span> Supervisor Command Center</text:p>
      <text:p text:style-name="P2"><text:span text:style-name="T1">Rol sistema:</text:span> Admin<text:line-break/><text:span text:style-name="Strong_20_Emphasis">Propósito:</text:span> Mantener el personal que participa en los turnos.</text:p>
      <text:p text:style-name="P3">Acciones:</text:p>
      <text:list xml:id="list441397007779151474" text:style-name="L1">
        <text:list-item>
          <text:p text:style-name="P9">Crear, consultar, eliminar, usuarios</text:p>
        </text:list-item>
        <text:list-item>
          <text:p text:style-name="P9">Editar datos de un usuario</text:p>
        </text:list-item>
        <text:list-item>
          <text:p text:style-name="P9">Asignar rol, equipo, grupo y permisos</text:p>
        </text:list-item>
      </text:list>
      <text:p text:style-name="P1"/>
      <text:p text:style-name="P1"><draw:frame draw:style-name="fr1" draw:name="Image1" text:anchor-type="char" svg:width="17cm" svg:height="8.184cm" draw:z-index="0"><draw:image xlink:href="Pictures/100002010000076E0000039419201FA3.png" xlink:type="simple" xlink:show="embed" xlink:actuate="onLoad"/></draw:frame></text:p>
      <text:h text:style-name="Heading_20_3" text:outline-level="3"><text:span text:style-name="Strong_20_Emphasis">2. </text:span><text:span text:style-name="Strong_20_Emphasis">Gestionar tipos de turno</text:span></text:h>
      <text:p text:style-name="P1"><text:span text:style-name="Strong_20_Emphasis">Actor:</text:span> Supervisor Command Center</text:p>
      <text:p text:style-name="P1"><text:span text:style-name="T1">Rol sistema:</text:span> Admin<text:line-break/><text:span text:style-name="Strong_20_Emphasis">Propósito:</text:span> Definir los turnos disponibles para el uso de los diferentes equipos.</text:p>
      <text:p text:style-name="P3">Acciones:</text:p>
      <text:list xml:id="list3870447499861392422" text:style-name="L2">
        <text:list-item>
          <text:p text:style-name="P10">Consultar, crear, eliminar tipos de turnos</text:p>
        </text:list-item>
        <text:list-item>
          <text:p text:style-name="P10">Editar valores de los tipos de turnos</text:p>
        </text:list-item>
      </text:list>
      <text:p text:style-name="Text_20_body"/>
      <text:p text:style-name="Text_20_body"/>
      <text:p text:style-name="Text_20_body"/>
      <text:p text:style-name="Text_20_body"/>
      <text:p text:style-name="Text_20_body"><draw:frame draw:style-name="fr1" draw:name="Image2" text:anchor-type="char" svg:width="17cm" svg:height="8.045cm" draw:z-index="1"><draw:image xlink:href="Pictures/1000020100000765000003808DD6195B.png" xlink:type="simple" xlink:show="embed" xlink:actuate="onLoad"/></draw:frame><text:soft-page-break/></text:p>
      <text:h text:style-name="Heading_20_3" text:outline-level="3"><text:span text:style-name="Strong_20_Emphasis">4</text:span><text:span text:style-name="Strong_20_Emphasis">. </text:span><text:span text:style-name="Strong_20_Emphasis">Configurar</text:span><text:span text:style-name="Strong_20_Emphasis"> fechas festivas</text:span></text:h>
      <text:p text:style-name="P1"><text:span text:style-name="Strong_20_Emphasis">Actor:</text:span> Supervisor Command Center</text:p>
      <text:p text:style-name="P1"><text:span text:style-name="T1">Rol sistema:</text:span> Admin<text:line-break/><text:span text:style-name="Strong_20_Emphasis">Propósito:</text:span> Configurar los días festivos para que la generación de turnos respete las condiciones especiales de estas fechas y equilibrar los turnos del personal. </text:p>
      <text:p text:style-name="P3">Acciones:</text:p>
      <text:list xml:id="list7379873812329405541" text:style-name="L3">
        <text:list-item>
          <text:p text:style-name="P11">Consultar, crear, eliminar días feriados</text:p>
        </text:list-item>
        <text:list-item>
          <text:p text:style-name="P11">Editar valores de los días feriados</text:p>
        </text:list-item>
      </text:list>
      <text:p text:style-name="Text_20_body"><draw:frame draw:style-name="fr2" draw:name="Image3" text:anchor-type="char" svg:width="17cm" svg:height="8.11cm" draw:z-index="2"><draw:image xlink:href="Pictures/1000020100000767000003886FC434C1.png" xlink:type="simple" xlink:show="embed" xlink:actuate="onLoad"/></draw:frame></text:p>
      <text:h text:style-name="Heading_20_2" text:outline-level="2"><text:soft-page-break/>Configuración de equipo/grupos</text:h>
      <text:h text:style-name="Heading_20_3" text:outline-level="3"><text:span text:style-name="Strong_20_Emphasis">5</text:span><text:span text:style-name="Strong_20_Emphasis">.</text:span><text:span text:style-name="Strong_20_Emphasis">1</text:span><text:span text:style-name="Strong_20_Emphasis">. </text:span><text:span text:style-name="Strong_20_Emphasis">Configurar </text:span><text:span text:style-name="Strong_20_Emphasis">equipo/grupos</text:span></text:h>
      <text:p text:style-name="P1"><text:span text:style-name="Strong_20_Emphasis">Actor:</text:span> Supervisor Command Center</text:p>
      <text:p text:style-name="P1"><text:span text:style-name="T1">Rol sistema:</text:span> Admin<text:line-break/><text:span text:style-name="Strong_20_Emphasis">Propósito:</text:span> Configurar los equipos con sus respectivos grupos que trabajan dentro del area (Command Center) </text:p>
      <text:p text:style-name="P3">Acciones:</text:p>
      <text:list xml:id="list33676196" text:continue-numbering="true" text:style-name="L3">
        <text:list-item>
          <text:p text:style-name="P11">Consultar, crear, eliminar equipos y grupos</text:p>
        </text:list-item>
        <text:list-item>
          <text:p text:style-name="P11">Editar los datos de equipos y grupo</text:p>
        </text:list-item>
        <text:list-item>
          <text:p text:style-name="P11">Seleccionar el tipo o modo con el se va realizar la generación de turnos semanales del personal</text:p>
        </text:list-item>
        <text:list-item>
          <text:p text:style-name="P11">Seleccionar los tipos de turnos que utiliza cada equipo</text:p>
        </text:list-item>
        <text:list-item>
          <text:p text:style-name="P8"><draw:frame draw:style-name="fr3" draw:name="Image4" text:anchor-type="char" svg:x="1.468cm" svg:y="0cm" svg:width="14.912cm" svg:height="7.116cm" draw:z-index="3"><draw:image xlink:href="Pictures/100002010000076E0000038CE5BF4196.png" xlink:type="simple" xlink:show="embed" xlink:actuate="onLoad"/></draw:frame>Planificación (opción engranaje) configurar los turnos que necesita cada grupo del equipo, necesario para el generador de turnos.</text:p>
        </text:list-item>
      </text:list>
      <text:h text:style-name="Heading_20_3" text:outline-level="3"><text:span text:style-name="Strong_20_Emphasis">5</text:span><text:span text:style-name="Strong_20_Emphasis">.</text:span><text:span text:style-name="Strong_20_Emphasis">2</text:span><text:span text:style-name="Strong_20_Emphasis">. </text:span><text:span text:style-name="Strong_20_Emphasis">Conf</text:span><text:span text:style-name="Strong_20_Emphasis">iguración planificación equipo/grupo</text:span></text:h>
      <text:p text:style-name="P1"><text:span text:style-name="Strong_20_Emphasis">Actor:</text:span> Supervisor Command Center</text:p>
      <text:p text:style-name="P1"><text:span text:style-name="T1">Rol sistema:</text:span> Admin<text:line-break/><text:span text:style-name="Strong_20_Emphasis">Propósito:</text:span> Configurar los turnos que necesita cada grupo del equipo, el modo con el que se van a generar los turnos semanales.</text:p>
      <text:p text:style-name="P3">Acciones:</text:p>
      <text:list xml:id="list33687398" text:continue-numbering="true" text:style-name="L3">
        <text:list-item>
          <text:p text:style-name="P11">Consultar, crear la planificación de los grupos de un equipo.</text:p>
        </text:list-item>
        <text:list-item>
          <text:p text:style-name="P11">Editar la planificación de los grupos un equipo</text:p>
        </text:list-item>
        <text:list-item>
          <text:p text:style-name="P11">Seleccionar el modo con el se va realizar la generación de turnos del personal; y configurar los datos de la planificación.</text:p>
          <text:list>
            <text:list-item>
              <text:p text:style-name="P8"><draw:frame draw:style-name="fr1" draw:name="Image6" text:anchor-type="char" svg:width="13.762cm" svg:height="1.468cm" draw:z-index="5"><draw:image xlink:href="Pictures/1000020100000612000000A6516F347E.png" xlink:type="simple" xlink:show="embed" xlink:actuate="onLoad"/></draw:frame><text:soft-page-break/>Modo rotativo: Se guarda la planificación basado en el numero mínimo de personas del grupo en cada turnos </text:p>
              <text:p text:style-name="P8"/>
            </text:list-item>
          </text:list>
        </text:list-item>
      </text:list>
      <text:p text:style-name="Text_20_body"/>
      <text:list xml:id="list33684569" text:continue-numbering="true" text:style-name="L3">
        <text:list-item>
          <text:p text:style-name="P8">Configurar el número necesario de personas de cada grupo para los feriados</text:p>
          <text:p text:style-name="P8"><draw:frame draw:style-name="fr1" draw:name="Image5" text:anchor-type="char" svg:width="15.725cm" svg:height="4.494cm" draw:z-index="4"><draw:image xlink:href="Pictures/100002010000063C000001D9CB552229.png" xlink:type="simple" xlink:show="embed" xlink:actuate="onLoad"/></draw:frame></text:p>
        </text:list-item>
      </text:list>
      <text:h text:style-name="Heading_20_3" text:outline-level="3"><text:span text:style-name="Strong_20_Emphasis">6. Gestión Solicitudes</text:span></text:h>
      <text:p text:style-name="P1"><text:span text:style-name="Strong_20_Emphasis">Actor:</text:span> Supervisor Command Center</text:p>
      <text:p text:style-name="P1"><text:span text:style-name="T1">Rol sistema:</text:span> Admin<text:line-break/><text:span text:style-name="Strong_20_Emphasis">Propósito:</text:span> Dar seguimiento a la solicitudes pendientes para aprobación o rechazo y revisión de historial.</text:p>
      <text:p text:style-name="P3">Acciones:</text:p>
      <text:list xml:id="list33694326" text:continue-numbering="true" text:style-name="L3">
        <text:list-item>
          <text:p text:style-name="P11"><text:span text:style-name="Strong_20_Emphasis"><text:span text:style-name="T2">Consultar </text:span></text:span><text:span text:style-name="Strong_20_Emphasis"><text:span text:style-name="T2">solicitudes pendientes</text:span></text:span></text:p>
        </text:list-item>
        <text:list-item>
          <text:p text:style-name="P11"><text:span text:style-name="Strong_20_Emphasis"><text:span text:style-name="T2">Consultar historial de solicitudes aprobadas o rechazadas</text:span></text:span></text:p>
        </text:list-item>
        <text:list-item>
          <text:p text:style-name="P11"><text:span text:style-name="Strong_20_Emphasis"><text:span text:style-name="T2">Registrar la aprobación </text:span></text:span><text:span text:style-name="Strong_20_Emphasis"><text:span text:style-name="T2">o rechazo</text:span></text:span><text:span text:style-name="Strong_20_Emphasis"><text:span text:style-name="T2"> de “</text:span></text:span><text:span text:style-name="Strong_20_Emphasis"><text:span text:style-name="T2">Supervisor Command Center</text:span></text:span><text:span text:style-name="Strong_20_Emphasis"><text:span text:style-name="T2">” como parte de la línea de aprobación (líder → admin). <text:s/></text:span></text:span></text:p>
        </text:list-item>
      </text:list>
      <text:p text:style-name="Text_20_body"><draw:frame draw:style-name="fr4" draw:name="Image9" text:anchor-type="char" svg:width="17cm" svg:height="7.08cm" draw:z-index="6"><draw:image xlink:href="Pictures/10000201000007740000031B27178B6D.png" xlink:type="simple" xlink:show="embed" xlink:actuate="onLoad"/></draw:frame><text:span text:style-name="Strong_20_Emphasis"><text:span text:style-name="T2"/></text:span></text:p>
      <text:h text:style-name="Heading_20_3" text:outline-level="3"><text:soft-page-break/><text:span text:style-name="Strong_20_Emphasis">7</text:span><text:span text:style-name="Strong_20_Emphasis">. </text:span><text:span text:style-name="Strong_20_Emphasis">V</text:span><text:span text:style-name="Strong_20_Emphasis">isualizar </text:span><text:span text:style-name="Strong_20_Emphasis">horas mensuales</text:span></text:h>
      <text:p text:style-name="P1"><text:span text:style-name="Strong_20_Emphasis">Actor:</text:span> Supervisor Command Center</text:p>
      <text:p text:style-name="P1"><text:span text:style-name="T1">Rol sistema:</text:span> Admin<text:line-break/><text:span text:style-name="Strong_20_Emphasis">Propósito:</text:span> Ver el resumen de horas mensuales, normales, extra y sobrecargo nocturno de cada usuario</text:p>
      <text:p text:style-name="P1"><text:span text:style-name="T1">Acciones</text:span>:</text:p>
      <text:list xml:id="list3000440547852917035" text:style-name="L4">
        <text:list-item>
          <text:p text:style-name="P12">Filtrar los datos por mes, año, equipos, grupos o persona</text:p>
        </text:list-item>
        <text:list-item>
          <text:p text:style-name="P12">Desglosar por semana las horas trabajadas</text:p>
        </text:list-item>
        <text:list-item>
          <text:p text:style-name="P12">Redirigir al calendario para ver la semana deseada para revisión</text:p>
        </text:list-item>
        <text:list-item>
          <text:p text:style-name="P12">Descargar un documento en formato pdf el resumen de horas mensuales</text:p>
        </text:list-item>
      </text:list>
      <text:p text:style-name="Text_20_body"><draw:frame draw:style-name="fr2" draw:name="Image10" text:anchor-type="char" svg:width="17cm" svg:height="8.11cm" draw:z-index="7"><draw:image xlink:href="Pictures/10000201000007660000038882337481.png" xlink:type="simple" xlink:show="embed" xlink:actuate="onLoad"/></draw:frame></text:p>
      <text:h text:style-name="Heading_20_2" text:outline-level="2">Calendario</text:h>
      <text:h text:style-name="Heading_20_3" text:outline-level="3"><text:span text:style-name="Strong_20_Emphasis">8</text:span><text:span text:style-name="Strong_20_Emphasis">.</text:span><text:span text:style-name="Strong_20_Emphasis">1</text:span><text:span text:style-name="Strong_20_Emphasis">. </text:span><text:span text:style-name="Strong_20_Emphasis">Visualizar Turnos</text:span></text:h>
      <text:p text:style-name="P1"><text:span text:style-name="Strong_20_Emphasis">Actor:</text:span> Supervisor Command Center</text:p>
      <text:p text:style-name="P1"><text:span text:style-name="T1">Rol sistema:</text:span> Admin<text:line-break/><text:span text:style-name="Strong_20_Emphasis">Propósito:</text:span> Visualización gráfica de la distribución de turnos de los miembros de cada equipo</text:p>
      <text:p text:style-name="P3">Acciones:</text:p>
      <text:list xml:id="list33692150" text:continue-list="list33694326" text:style-name="L3">
        <text:list-item>
          <text:p text:style-name="P11"><text:span text:style-name="Strong_20_Emphasis"><text:span text:style-name="T2">Filtrar los turnos mostrados por equipo, grupo, persona, mes y año.</text:span></text:span></text:p>
        </text:list-item>
        <text:list-item>
          <text:p text:style-name="P11"><text:span text:style-name="Strong_20_Emphasis"><text:span text:style-name="T2">Navegar entre semanas </text:span></text:span></text:p>
        </text:list-item>
        <text:list-item>
          <text:p text:style-name="P11"><text:span text:style-name="Strong_20_Emphasis"><text:span text:style-name="T2">Ampliar la vista muestra todas las semanas del mes </text:span></text:span><text:span text:style-name="Strong_20_Emphasis"><text:span text:style-name="T2">condensadas</text:span></text:span></text:p>
        </text:list-item>
        <text:list-item>
          <text:p text:style-name="P11"><text:span text:style-name="Strong_20_Emphasis"><text:span text:style-name="T2">Al ampliar la vista puede filtrar hasta 3 personas simultaneas. </text:span></text:span></text:p>
        </text:list-item>
      </text:list>
      <text:p text:style-name="P1"><text:span text:style-name="Strong_20_Emphasis"><text:span text:style-name="T2"/></text:span></text:p>
      <text:p text:style-name="P1"><draw:frame draw:style-name="fr1" draw:name="Image13" text:anchor-type="char" svg:width="14.536cm" svg:height="6.803cm" draw:z-index="10"><draw:image xlink:href="Pictures/100002010000076700000376537B57BD.png" xlink:type="simple" xlink:show="embed" xlink:actuate="onLoad"/></draw:frame><text:soft-page-break/><text:span text:style-name="Strong_20_Emphasis"><text:span text:style-name="T2"/></text:span></text:p>
      <text:p text:style-name="P1"><draw:frame draw:style-name="fr1" draw:name="Image11" text:anchor-type="char" svg:width="14.522cm" svg:height="6.334cm" draw:z-index="8"><draw:image xlink:href="Pictures/100002010000076800000334762EA18B.png" xlink:type="simple" xlink:show="embed" xlink:actuate="onLoad"/></draw:frame><text:span text:style-name="Strong_20_Emphasis"><text:span text:style-name="T2"/></text:span></text:p>
      <text:h text:style-name="Heading_20_3" text:outline-level="3"><text:span text:style-name="Strong_20_Emphasis">8</text:span><text:span text:style-name="Strong_20_Emphasis">.</text:span><text:span text:style-name="Strong_20_Emphasis">2</text:span><text:span text:style-name="Strong_20_Emphasis">. </text:span><text:span text:style-name="Strong_20_Emphasis">Generar</text:span><text:span text:style-name="Strong_20_Emphasis"> Turnos</text:span></text:h>
      <text:p text:style-name="P1"><text:span text:style-name="Strong_20_Emphasis">Actor:</text:span> Supervisor Command Center</text:p>
      <text:p text:style-name="P1"><text:span text:style-name="T1">Rol sistema:</text:span> Admin<text:line-break/><text:span text:style-name="Strong_20_Emphasis">Propósito:</text:span> Generar la distribución de turnos para los miembros de cualquier equipo.</text:p>
      <text:p text:style-name="P3">Acciones:</text:p>
      <text:list xml:id="list33705214" text:continue-numbering="true" text:style-name="L3">
        <text:list-item>
          <text:p text:style-name="P11"><text:span text:style-name="Strong_20_Emphasis"><text:span text:style-name="T2">Generar la distribución de turnos de N semanas para los miembros de cualquier equipo a partir una fecha deseada.</text:span></text:span></text:p>
        </text:list-item>
        <text:list-item>
          <text:p text:style-name="P11"><text:span text:style-name="Strong_20_Emphasis"><text:span text:style-name="T2">Previsualización de la generación de turnos antes de guardar.</text:span></text:span></text:p>
        </text:list-item>
        <text:list-item>
          <text:p text:style-name="P11"><text:span text:style-name="Strong_20_Emphasis"><text:span text:style-name="T2">Guardar toda la distribución generada por completo o hacerlo por semanas.</text:span></text:span></text:p>
        </text:list-item>
        <text:list-item>
          <text:p text:style-name="P8"><text:span text:style-name="Strong_20_Emphasis"><text:span text:style-name="T2">Eliminación de turno</text:span></text:span></text:p>
        </text:list-item>
      </text:list>
      <text:p text:style-name="Text_20_body"><draw:frame draw:style-name="fr1" draw:name="Image12" text:anchor-type="char" svg:width="15.563cm" svg:height="7.221cm" draw:z-index="9"><draw:image xlink:href="Pictures/10000201000007650000036E38B00491.png" xlink:type="simple" xlink:show="embed" xlink:actuate="onLoad"/></draw:frame><text:soft-page-break/><text:span text:style-name="Strong_20_Emphasis"><text:span text:style-name="T2"/></text:span></text:p>
      <text:h text:style-name="Heading_20_3" text:outline-level="3"><text:span text:style-name="Strong_20_Emphasis">8</text:span><text:span text:style-name="Strong_20_Emphasis">.</text:span><text:span text:style-name="Strong_20_Emphasis">3</text:span><text:span text:style-name="Strong_20_Emphasis">. </text:span><text:span text:style-name="Strong_20_Emphasis">Mover Turnos<text:tab/></text:span></text:h>
      <text:p text:style-name="P1"><text:span text:style-name="Strong_20_Emphasis">Actor:</text:span> Supervisor Command Center</text:p>
      <text:p text:style-name="P1"><text:span text:style-name="T1">Rol sistema:</text:span> Admin<text:line-break/><text:span text:style-name="Strong_20_Emphasis">Propósito:</text:span> Ajustar la distribución de turnos de acuerdo a la necesidad de los miembros o del servicio (Command Center).</text:p>
      <text:p text:style-name="P5">Acciones: </text:p>
      <text:list xml:id="list33694712" text:continue-numbering="true" text:style-name="L3">
        <text:list-item>
          <text:p text:style-name="P11"><text:span text:style-name="Strong_20_Emphasis"><text:span text:style-name="T2">Intercambiar turnos entre miembros que pertenezcan al mismo grupo dentro del equipo.</text:span></text:span></text:p>
        </text:list-item>
        <text:list-item>
          <text:p text:style-name="P11"><text:span text:style-name="Strong_20_Emphasis"><text:span text:style-name="T2">Agregar un turno para un miembro del equipo en cualquier día y horario. </text:span></text:span><text:span text:style-name="Strong_20_Emphasis"><text:span text:style-name="T2">(mostrará advertencia de sobrecargo de turno)</text:span></text:span></text:p>
        </text:list-item>
        <text:list-item>
          <text:p text:style-name="P11"><text:span text:style-name="Strong_20_Emphasis"><text:span text:style-name="T2">Mover los turnos de los miembros entre días, horarios (mostrará advertencias cuando una persona doble turno, no tenga descanso suficiente para el siguiente turno, impedir que una persona tenga más de un turno en el mismo horario)</text:span></text:span></text:p>
        </text:list-item>
      </text:list>
      <text:p text:style-name="P1"><draw:frame draw:style-name="fr5" draw:name="Image15" text:anchor-type="char" svg:x="2.205cm" svg:y="0.277cm" svg:width="9.308cm" svg:height="5.71cm" draw:z-index="12"><draw:image xlink:href="Pictures/10000201000001FB00000137C8F5CE92.png" xlink:type="simple" xlink:show="embed" xlink:actuate="onLoad"/></draw:frame><text:span text:style-name="Strong_20_Emphasis"><text:span text:style-name="T2"/></text:span></text:p>
      <text:p text:style-name="P1"><text:span text:style-name="Strong_20_Emphasis"><text:span text:style-name="T2"/></text:span></text:p>
      <text:h text:style-name="Heading_20_3" text:outline-level="3"><text:span text:style-name="Strong_20_Emphasis">8</text:span><text:span text:style-name="Strong_20_Emphasis">.</text:span><text:span text:style-name="Strong_20_Emphasis">4</text:span><text:span text:style-name="Strong_20_Emphasis">. </text:span><text:span text:style-name="Strong_20_Emphasis">Solicitar vacaciones</text:span><text:span text:style-name="Strong_20_Emphasis"><text:tab/></text:span></text:h>
      <text:p text:style-name="P1"><text:span text:style-name="Strong_20_Emphasis">Actor:</text:span> Supervisor Command Center</text:p>
      <text:p text:style-name="P1"><text:soft-page-break/><text:span text:style-name="T1">Rol sistema:</text:span> Admin<text:line-break/><text:span text:style-name="Strong_20_Emphasis">Propósito:</text:span> Cada miembro debe enviar la planificación de sus vacaciones para ser revisado mediante la linea de aprobación (lider → Admin)</text:p>
      <text:p text:style-name="P5">Acciones: </text:p>
      <text:list xml:id="list33676246" text:continue-numbering="true" text:style-name="L3">
        <text:list-item>
          <text:p text:style-name="P11"><text:span text:style-name="Strong_20_Emphasis"><text:span text:style-name="T2">Seleccionar el rango de fechas de inicio y fin de sus vacaciones y enviarlas a revisión de aprobación. De esta forma al generar los turnos se respeten los días solicitados.</text:span></text:span></text:p>
        </text:list-item>
      </text:list>
      <text:p text:style-name="P1"><text:span text:style-name="Strong_20_Emphasis"><text:span text:style-name="T2"/></text:span></text:p>
      <text:p text:style-name="P1"><draw:frame draw:style-name="fr1" draw:name="Image14" text:anchor-type="char" svg:width="14.157cm" svg:height="6.793cm" draw:z-index="11"><draw:image xlink:href="Pictures/10000201000007560000038504ECFE2F.png" xlink:type="simple" xlink:show="embed" xlink:actuate="onLoad"/></draw:frame><text:span text:style-name="Strong_20_Emphasis"><text:span text:style-name="T2"/></text:span></text:p>
      <text:p text:style-name="P4"><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7"><text:span text:style-name="Strong_20_Emphasis"><text:span text:style-name="T1">Comportamiento Sistema</text:span></text:span></text:p>
      <text:list xml:id="list7066703253060057488" text:style-name="L5">
        <text:list-item>
          <text:p text:style-name="P13"><text:span text:style-name="Strong_20_Emphasis"><text:span text:style-name="T2">Al crear un nuevo turno en una semana donde el usuario ya cuenta con 5 turnos se despliega una advertencia </text:span></text:span><text:span text:style-name="Strong_20_Emphasis"><text:span text:style-name="T2">que se aplicará </text:span></text:span><text:span text:style-name="Strong_20_Emphasis"><text:span text:style-name="T1">sobrecargo.</text:span></text:span></text:p>
        </text:list-item>
        <text:list-item>
          <text:p text:style-name="P13"><text:span text:style-name="Strong_20_Emphasis"><text:span text:style-name="T2">Al intercambiar un turno persona A con persona B primero se comprueba que sea del mismo grupo, y después se desplegará una advertencia si amerita de (rompe su descanso de 2 días continuos, no tiene suficiente descanso para su siguiente o anterior turno)</text:span></text:span></text:p>
        </text:list-item>
        <text:list-item>
          <text:p text:style-name="P13"><text:span text:style-name="Strong_20_Emphasis"><text:span text:style-name="T2">Un miembro no puede agregar un turno si ya tiene un turno en el mismo día en el mismo horario.</text:span></text:span></text:p>
          <text:p text:style-name="P13"><text:span text:style-name="Strong_20_Emphasis"><text:span text:style-name="T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loext:hyphenation-keep-type="column" loext:hyphenation-keep-line="false"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text-properties style:font-name="Liberation Serif" fo:font-size="18pt" fo:font-weight="bold" style:font-name-asian="NSimSun" style:font-size-asian="18pt" style:font-weight-asian="bold" style:font-name-complex="Arial"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size="14pt" fo:font-weight="bold" style:font-name-asian="NSimSun" style:font-size-asian="14pt" style:font-weight-asian="bold" style:font-name-complex="Ari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04cm 0.002cm" fo:padding="0cm" fo:border-left="none" fo:border-right="none" fo:border-top="none" fo:border-bottom="0.008cm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fo:background-color="transparent">
          <style:background-image/>
        </style:header-footer-properties>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2-23T08:57:13.562029800</meta:creation-date>
    <dc:date>2026-05-29T13:41:47.60</dc:date>
    <meta:editing-duration>PT5H54M37S</meta:editing-duration>
    <meta:editing-cycles>5</meta:editing-cycles>
    <meta:generator>OpenOffice/4.1.13$Win32 OpenOffice.org_project/4113m1$Build-9810</meta:generator>
    <meta:document-statistic meta:table-count="0" meta:image-count="13" meta:object-count="0" meta:page-count="8" meta:paragraph-count="86" meta:word-count="841" meta:character-count="5246"/>
  </office:meta>
</office:document-meta>
</file>